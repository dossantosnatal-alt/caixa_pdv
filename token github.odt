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hp_LL5xa1mgkZqyLN3ZmlAydpwZodi7pI4CsPy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20:23:03.237325137</meta:creation-date>
    <dc:date>2026-06-30T22:35:43.183598487</dc:date>
    <meta:editing-duration>PT1H26M19S</meta:editing-duration>
    <meta:editing-cycles>2</meta:editing-cycles>
    <meta:generator>LibreOffice/26.2.0.3$Linux_X86_64 LibreOffice_project/afbbd0df0edb6d40b450b0337ac646b0913a760c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