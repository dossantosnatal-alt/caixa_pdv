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AOzKklQOfJcrefknDy9IAkVem683Xl2Mwqq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20:23:03.237325137</meta:creation-date>
    <dc:date>2026-06-30T20:24:32.226240357</dc:date>
    <meta:editing-duration>PT1M2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6.2.0.3$Linux_X86_64 LibreOffice_project/afbbd0df0edb6d40b450b0337ac646b0913a760c</meta:generator>
  </office:meta>
</office:document-meta>
</file>